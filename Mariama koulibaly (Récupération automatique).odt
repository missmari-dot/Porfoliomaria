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TableCell10" style:family="table-cell">
      <style:table-cell-properties fo:border="none" style:writing-mode="lr-tb" fo:padding-top="0in" fo:padding-left="0.0798in" fo:padding-bottom="0in" fo:padding-right="0.0798in"/>
    </style:style>
    <style:style style:name="P11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P12" style:parent-style-name="Normal" style:family="paragraph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P14" style:parent-style-name="Normal" style:family="paragraph">
      <style:text-properties fo:font-size="20pt" style:font-size-asian="20pt" style:font-size-complex="20pt"/>
    </style:style>
    <style:style style:name="TableCell15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6" style:parent-style-name="Titre3" style:family="paragraph">
      <style:text-properties fo:font-size="20pt" style:font-size-asian="20pt" style:font-size-complex="20pt"/>
    </style:style>
    <style:style style:name="T17" style:parent-style-name="Policepardéfaut" style:family="text">
      <style:text-properties style:font-name="Times New Roman" fo:font-weight="normal" style:font-weight-asian="normal" style:font-weight-complex="bold" fo:color="#000000" fo:font-size="14pt" style:font-size-asian="14pt" style:font-size-complex="14pt"/>
    </style:style>
    <style:style style:name="T18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98in" fo:padding-bottom="0in" fo:padding-right="0.0798in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Policepardéfaut" style:family="text">
      <style:text-properties style:language-complex="fr" style:country-complex="FR"/>
    </style:style>
    <style:style style:name="T25" style:parent-style-name="Policepardéfaut" style:family="text">
      <style:text-properties style:language-complex="fr" style:country-complex="FR"/>
    </style:style>
    <style:style style:name="T26" style:parent-style-name="Policepardéfaut" style:family="text">
      <style:text-properties style:language-complex="fr" style:country-complex="FR"/>
    </style:style>
    <style:style style:name="T27" style:parent-style-name="Lienhypertexte" style:family="text">
      <style:text-properties style:language-complex="fr" style:country-complex="FR"/>
    </style:style>
    <style:style style:name="T28" style:parent-style-name="Lienhypertexte" style:family="text">
      <style:text-properties style:language-complex="fr" style:country-complex="FR"/>
    </style:style>
    <style:style style:name="T29" style:parent-style-name="Lienhypertexte" style:family="text">
      <style:text-properties style:language-complex="fr" style:country-complex="FR"/>
    </style:style>
    <style:style style:name="T30" style:parent-style-name="Policepardéfaut" style:family="text">
      <style:text-properties style:language-complex="fr" style:country-complex="FR"/>
    </style:style>
    <style:style style:name="T31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language-complex="fr" style:country-complex="FR"/>
    </style:style>
    <style:style style:name="P33" style:parent-style-name="Paragraphedeliste" style:list-style-name="LFO14" style:family="paragraph"/>
    <style:style style:name="P34" style:parent-style-name="Paragraphedeliste" style:list-style-name="LFO14" style:family="paragraph"/>
    <style:style style:name="P35" style:parent-style-name="Paragraphedeliste" style:list-style-name="LFO14" style:family="paragraph"/>
    <style:style style:name="P36" style:parent-style-name="Titre3" style:family="paragraph">
      <style:text-properties style:language-complex="fr" style:country-complex="FR"/>
    </style:style>
    <style:style style:name="P37" style:parent-style-name="Normal" style:family="paragraph">
      <style:text-properties style:language-complex="fr" style:country-complex="FR"/>
    </style:style>
    <style:style style:name="TableCell38" style:family="table-cell">
      <style:table-cell-properties fo:border="none" style:writing-mode="lr-tb" fo:padding-top="0in" fo:padding-left="0.0798in" fo:padding-bottom="0in" fo:padding-right="0.0798in"/>
    </style:style>
    <style:style style:name="P39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40" style:family="table-cell">
      <style:table-cell-properties fo:border="none" style:writing-mode="lr-tb" fo:padding-top="0in" fo:padding-left="0.0798in" fo:padding-bottom="0in" fo:padding-right="0.0798in"/>
    </style:style>
    <style:style style:name="T41" style:parent-style-name="Policepardéfaut" style:family="text">
      <style:text-properties style:language-complex="fr" style:country-complex="FR"/>
    </style:style>
    <style:style style:name="P42" style:parent-style-name="Paragraphedeliste" style:list-style-name="LFO15" style:family="paragraph"/>
    <style:style style:name="P43" style:parent-style-name="Paragraphedeliste" style:list-style-name="LFO15" style:family="paragraph"/>
    <style:style style:name="P44" style:parent-style-name="Paragraphedeliste" style:list-style-name="LFO15" style:family="paragraph"/>
    <style:style style:name="P45" style:parent-style-name="Paragraphedeliste" style:list-style-name="LFO15" style:family="paragraph"/>
    <style:style style:name="P46" style:parent-style-name="Paragraphedeliste" style:list-style-name="LFO15" style:family="paragraph"/>
    <style:style style:name="P47" style:parent-style-name="Paragraphedeliste" style:list-style-name="LFO15" style:family="paragraph"/>
    <style:style style:name="T48" style:parent-style-name="Titre2Car" style:family="text">
      <style:text-properties fo:font-weight="bold" style:font-weight-asian="bold" style:language-complex="fr" style:country-complex="FR"/>
    </style:style>
    <style:style style:name="P49" style:parent-style-name="Normal" style:family="paragraph">
      <style:text-properties fo:color="#000000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P51" style:parent-style-name="Normal" style:family="paragraph">
      <style:text-properties fo:color="#000000" fo:language="en" fo:country="US" style:language-asian="zh" style:country-asian="CN"/>
    </style:style>
    <style:style style:name="P52" style:parent-style-name="Normal" style:family="paragraph">
      <style:text-properties fo:color="#000000" fo:language="en" fo:country="US" style:language-asian="zh" style:country-asian="CN"/>
    </style:style>
    <style:style style:name="P53" style:parent-style-name="Normal" style:family="paragraph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P55" style:parent-style-name="Normal" style:family="paragraph">
      <style:text-properties fo:color="#000000" fo:language="en" fo:country="US" style:language-asian="zh" style:country-asian="CN"/>
    </style:style>
    <style:style style:name="P56" style:parent-style-name="Normal" style:family="paragraph">
      <style:text-properties fo:color="#000000" fo:language="en" fo:country="US" style:language-asian="zh" style:country-asian="CN"/>
    </style:style>
    <style:style style:name="P57" style:parent-style-name="Normal" style:family="paragraph">
      <style:text-properties fo:color="#000000" fo:language="en" fo:country="US" style:language-asian="zh" style:country-asian="CN"/>
    </style:style>
    <style:style style:name="P58" style:parent-style-name="Normal" style:family="paragraph">
      <style:text-properties fo:color="#000000" fo:language="en" fo:country="US" style:language-asian="zh" style:country-asian="CN"/>
    </style:style>
    <style:style style:name="P59" style:parent-style-name="Normal" style:family="paragraph">
      <style:text-properties fo:color="#000000" fo:language="en" fo:country="US" style:language-asian="zh" style:country-asian="CN"/>
    </style:style>
    <style:style style:name="P60" style:parent-style-name="Normal" style:family="paragraph">
      <style:text-properties fo:color="#000000" fo:language="en" fo:country="US" style:language-asian="zh" style:country-asian="CN"/>
    </style:style>
    <style:style style:name="P61" style:parent-style-name="Normal" style:family="paragraph">
      <style:text-properties fo:color="#000000" fo:language="en" fo:country="US" style:language-asian="zh" style:country-asian="CN"/>
    </style:style>
    <style:style style:name="P62" style:parent-style-name="Normal" style:family="paragraph">
      <style:text-properties fo:color="#000000" fo:language="en" fo:country="US" style:language-asian="zh" style:country-asian="CN"/>
    </style:style>
    <style:style style:name="P63" style:parent-style-name="Normal" style:family="paragraph">
      <style:text-properties fo:color="#000000" fo:language="en" fo:country="US" style:language-asian="zh" style:country-asian="CN"/>
    </style:style>
    <style:style style:name="P64" style:parent-style-name="Normal" style:family="paragraph">
      <style:text-properties fo:color="#000000" fo:language="en" fo:country="US" style:language-asian="zh" style:country-asian="CN"/>
    </style:style>
    <style:style style:name="P65" style:parent-style-name="Normal" style:family="paragraph">
      <style:text-properties fo:color="#000000" fo:language="en" fo:country="US" style:language-asian="zh" style:country-asian="CN"/>
    </style:style>
    <style:style style:name="P66" style:parent-style-name="Normal" style:family="paragraph">
      <style:text-properties fo:color="#000000" fo:language="en" fo:country="US" style:language-asian="zh" style:country-asian="CN"/>
    </style:style>
    <style:style style:name="T67" style:parent-style-name="Titre2Car" style:family="text">
      <style:text-properties style:language-complex="fr" style:country-complex="FR"/>
    </style:style>
    <style:style style:name="P68" style:parent-style-name="Paragraphedeliste" style:list-style-name="LFO16" style:family="paragraph"/>
    <style:style style:name="T69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0" style:parent-style-name="Paragraphedeliste" style:list-style-name="LFO16" style:family="paragraph"/>
    <style:style style:name="T71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2" style:parent-style-name="Paragraphedeliste" style:list-style-name="LFO16" style:family="paragraph"/>
    <style:style style:name="T73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4" style:parent-style-name="Paragraphedeliste" style:list-style-name="LFO16" style:family="paragraph"/>
    <style:style style:name="T75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6" style:parent-style-name="Paragraphedeliste" style:list-style-name="LFO16" style:family="paragraph"/>
    <style:style style:name="T77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T78" style:parent-style-name="Titre2Car" style:family="text">
      <style:text-properties style:language-complex="fr" style:country-complex="FR"/>
    </style:style>
    <style:style style:name="P79" style:parent-style-name="Normal" style:list-style-name="LFO17" style:family="paragraph">
      <style:text-properties fo:color="#000000" style:language-asian="zh" style:country-asian="CN"/>
    </style:style>
    <style:style style:name="P80" style:parent-style-name="Normal" style:list-style-name="LFO17" style:family="paragraph">
      <style:text-properties fo:color="#000000" style:language-asian="zh" style:country-asian="CN"/>
    </style:style>
    <style:style style:name="P81" style:parent-style-name="Normal" style:list-style-name="LFO17" style:family="paragraph">
      <style:text-properties fo:color="#000000" style:language-asian="zh" style:country-asian="CN"/>
    </style:style>
    <style:style style:name="P82" style:parent-style-name="Normal" style:list-style-name="LFO17" style:family="paragraph">
      <style:text-properties fo:color="#000000" style:language-asian="zh" style:country-asian="CN"/>
    </style:style>
    <style:style style:name="P83" style:parent-style-name="Normal" style:list-style-name="LFO17" style:family="paragraph">
      <style:text-properties fo:color="#000000" style:language-asian="zh" style:country-asian="CN"/>
    </style:style>
    <style:style style:name="P84" style:parent-style-name="Normal" style:family="paragraph">
      <style:text-properties fo:color="#000000" fo:language="en" fo:country="US" style:language-asian="zh" style:country-asian="CN"/>
    </style:style>
    <style:style style:name="P85" style:parent-style-name="Normal" style:family="paragraph">
      <style:paragraph-properties>
        <style:tab-stops>
          <style:tab-stop style:type="left" style:position="3.3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17014in" svg:height="2.67917in" draw:id="id0" draw:style-name="a2" draw:name="Ovale" text:anchor-type="as-char"><svg:title/><svg:desc/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">
            <text:p text:style-name="P11"/>
            <text:p text:style-name="P12"/>
            <text:p text:style-name="P13"/>
            <text:p text:style-name="P14"/>
          </table:table-cell>
          <table:table-cell table:style-name="TableCell15">
            <text:h text:style-name="P16" text:outline-level="3">Mariama koulibaly</text:h>
            <text:h text:style-name="Titre3" text:outline-level="3"><text:span text:style-name="T17">E</text:span><text:span text:style-name="T18">tudiante en Master 1 Data science et IA</text:span></text:h>
            <text:p text:style-name="Normal"/>
          </table:table-cell>
        </table:table-row>
        <table:table-row table:style-name="TableRow19">
          <table:table-cell table:style-name="TableCell20">
            <text:h text:style-name="Titre3" text:outline-level="3"><text:span text:style-name="T21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, analyse de donnée, Machine Learning, Deep Learning et DevOps et prête à relever de nouveaux défis.</text:p>
            <text:p text:style-name="Normal"/>
            <text:h text:style-name="Titre3" text:outline-level="3"><text:span text:style-name="T22">Contact</text:span></text:h>
            <text:p text:style-name="Normal"><text:span text:style-name="T23">TÉLÉPHONE :</text:span></text:p>
            <text:p text:style-name="Normal">774849307</text:p>
            <text:p text:style-name="Normal">Github :<text:s/><text:a xlink:href="https://github.com/missmari-dot" office:target-frame-name="_top" xlink:show="replace"><text:span text:style-name="Lienhypertexte">missmari-dot (mariama)</text:span></text:a></text:p>
            <text:p text:style-name="Normal"><text:span text:style-name="T24">Mon porfolio</text:span><text:span text:style-name="T25"> :</text:span><text:span text:style-name="T26"><text:s/></text:span><text:a xlink:href="https://missmari-dot.github.io/Porfoliomaria/" office:target-frame-name="_top" xlink:show="replace"><text:span text:style-name="T27">Mariam</text:span><text:bookmark-start text:name="_Hlt230291622"/><text:bookmark-start text:name="_Hlt230291623"/><text:span text:style-name="T28">a</text:span><text:bookmark-end text:name="_Hlt230291622"/><text:bookmark-end text:name="_Hlt230291623"/><text:span text:style-name="T29"><text:s/>Koulibaly - Portfolio</text:span></text:a></text:p>
            <text:p text:style-name="Normal"><text:span text:style-name="T30">E-MAIL :</text:span></text:p>
            <text:p text:style-name="Normal"><text:span text:style-name="T31">Mariama.koilibaly.587@gmail.com</text:span></text:p>
            <text:h text:style-name="Titre3" text:outline-level="3"><text:span text:style-name="T32">Loisirs</text:span></text:h>
            <text:list text:style-name="LFO14" text:continue-numbering="true">
              <text:list-item>
                <text:p text:style-name="P33">Lecture et apprentissage continu<text:s/></text:p>
              </text:list-item>
              <text:list-item>
                <text:p text:style-name="P34">Programmation</text:p>
              </text:list-item>
              <text:list-item>
                <text:p text:style-name="P35">Veille technologique et développement personnel<text:s/></text:p>
              </text:list-item>
            </text:list>
            <text:p text:style-name="Normal"/>
            <text:h text:style-name="P36" text:outline-level="3">Gestion de projet</text:h>
            <text:p text:style-name="P37">Methodes agile : Trello, Kanban, Scrum</text:p>
          </table:table-cell>
          <table:table-cell table:style-name="TableCell38">
            <text:p text:style-name="P39"/>
          </table:table-cell>
          <table:table-cell table:style-name="TableCell40">
            <text:h text:style-name="Titre2" text:outline-level="2"><text:span text:style-name="T41">FORMATION</text:span></text:h>
            <text:p text:style-name="Normal">INSTITUT SUPERIEUR D’INFORMATIQUE</text:p>
            <text:p text:style-name="Normal">•2025-2026 Master 1 Data science et IA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5" text:continue-numbering="true">
              <text:list-item>
                <text:p text:style-name="P42">Projet de gestion de stock (Java EE)</text:p>
              </text:list-item>
              <text:list-item>
                <text:p text:style-name="P43">Gestion des Commandes pour Restaurant<text:s/>IsiBurger<text:s/>(Laravel + CI/CD avec GitHub Actions et Docker)</text:p>
              </text:list-item>
              <text:list-item>
                <text:p text:style-name="P44">Application de gestion<text:s/>etablissemnt<text:s/>(Spring Boot)</text:p>
              </text:list-item>
              <text:list-item>
                <text:p text:style-name="P45">Portail scolaire administratif (Laravel + Angular)</text:p>
              </text:list-item>
              <text:list-item>
                <text:p text:style-name="P46">Plateforme facilitant la réservation de médicament et l’accès aux informations sur les pharmacies au Sénégal(Laravel, Angular, Flutter)</text:p>
              </text:list-item>
              <text:list-item>
                <text:p text:style-name="P47">Plateforme de redaction de mémoire pour etudiant pour un client(Laravel)</text:p>
              </text:list-item>
            </text:list>
            <text:h text:style-name="Titre2" text:outline-level="2"><text:span text:style-name="T48">COMPÉTENCES</text:span></text:h>
            <text:p text:style-name="P49">• FRONT END :</text:p>
            <text:p text:style-name="P50">-<text:s/>HTML5/CSS3</text:p>
            <text:p text:style-name="P51">-<text:s/>Bootstrap</text:p>
            <text:p text:style-name="P52">-<text:s/>JavaScript</text:p>
            <text:p text:style-name="P53">• BACK END :</text:p>
            <text:p text:style-name="P54">-<text:s/>PHP</text:p>
            <text:p text:style-name="P55">-<text:s/>SQL</text:p>
            <text:p text:style-name="P56">• Autres langages :</text:p>
            <text:p text:style-name="P57">-<text:s/>Langage C/C++/C#</text:p>
            <text:p text:style-name="P58">-<text:s/>Python</text:p>
            <text:p text:style-name="P59">-<text:s/>JAVA</text:p>
            <text:p text:style-name="P60">-<text:s/>Algorithme</text:p>
            <text:p text:style-name="P61">• Framework</text:p>
            <text:p text:style-name="P62">-<text:s/>Angular</text:p>
            <text:p text:style-name="P63">-<text:s/>Laravel</text:p>
            <text:p text:style-name="P64">-<text:s/>Flutter</text:p>
            <text:p text:style-name="P65">• CMS</text:p>
            <text:p text:style-name="P66">-Wordpress</text:p>
            <text:p text:style-name="Normal"><text:span text:style-name="T67">OUTILS</text:span></text:p>
            <text:list text:style-name="LFO16" text:continue-numbering="true">
              <text:list-item>
                <text:p text:style-name="P68"><text:span text:style-name="T69">Vs Code<text:s/></text:span></text:p>
              </text:list-item>
              <text:list-item>
                <text:p text:style-name="P70"><text:span text:style-name="T71">Intellij IDEA</text:span></text:p>
              </text:list-item>
              <text:list-item>
                <text:p text:style-name="P72"><text:span text:style-name="T73">Php Storm</text:span></text:p>
              </text:list-item>
              <text:list-item>
                <text:p text:style-name="P74"><text:span text:style-name="T75">Photoshop <text:s/></text:span></text:p>
              </text:list-item>
              <text:list-item>
                <text:p text:style-name="P76"><text:span text:style-name="T77">Android Studio</text:span></text:p>
              </text:list-item>
            </text:list>
            <text:p text:style-name="Normal"><text:span text:style-name="T78">Devops</text:span></text:p>
            <text:list text:style-name="LFO17" text:continue-numbering="true">
              <text:list-item>
                <text:p text:style-name="P79">Conteneurisation : Docker<text:s/></text:p>
              </text:list-item>
              <text:list-item>
                <text:p text:style-name="P80">CI/CD : GitHub Actions, GitLab CI/CD<text:s/></text:p>
              </text:list-item>
              <text:list-item>
                <text:p text:style-name="P81">Monitoring &amp; Observabilité : ELK Stack (Elasticsearch, Logstash, Kibana), Prometheus, Grafana<text:s/></text:p>
              </text:list-item>
              <text:list-item>
                <text:p text:style-name="P82">Déploiement : Render, Vercel, GitHub Pages<text:s/></text:p>
              </text:list-item>
              <text:list-item>
                <text:p text:style-name="P83">SonarQube</text:p>
              </text:list-item>
            </text:list>
            <text:p text:style-name="Normal"/>
            <text:p text:style-name="Normal"/>
            <text:p text:style-name="Normal"/>
            <text:p text:style-name="P84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text-properties fo:hyphenate="false"/>
    </style:style>
    <style:style style:name="Listeànuméros2" style:display-name="Liste à numéros 2" style:family="paragraph" style:parent-style-name="Normal" style:list-style-name="LFO4">
      <style:text-properties fo:hyphenate="false"/>
    </style:style>
    <style:style style:name="Listeànuméros3" style:display-name="Liste à numéros 3" style:family="paragraph" style:parent-style-name="Normal" style:list-style-name="LFO5">
      <style:text-properties fo:hyphenate="false"/>
    </style:style>
    <style:style style:name="Listeànuméros4" style:display-name="Liste à numéros 4" style:family="paragraph" style:parent-style-name="Normal" style:list-style-name="LFO6">
      <style:text-properties fo:hyphenate="false"/>
    </style:style>
    <style:style style:name="Listeànuméros5" style:display-name="Liste à numéros 5" style:family="paragraph" style:parent-style-name="Normal" style:list-style-name="LFO7">
      <style:text-properties fo:hyphenate="false"/>
    </style:style>
    <style:style style:name="Listeàpuces" style:display-name="Liste à puces" style:family="paragraph" style:parent-style-name="Normal" style:list-style-name="LFO8">
      <style:text-properties fo:hyphenate="false"/>
    </style:style>
    <style:style style:name="Listeàpuces2" style:display-name="Liste à puces 2" style:family="paragraph" style:parent-style-name="Normal" style:list-style-name="LFO9">
      <style:text-properties fo:hyphenate="false"/>
    </style:style>
    <style:style style:name="Listeàpuces3" style:display-name="Liste à puces 3" style:family="paragraph" style:parent-style-name="Normal" style:list-style-name="LFO10">
      <style:text-properties fo:hyphenate="false"/>
    </style:style>
    <style:style style:name="Listeàpuces4" style:display-name="Liste à puces 4" style:family="paragraph" style:parent-style-name="Normal" style:list-style-name="LFO11">
      <style:text-properties fo:hyphenate="false"/>
    </style:style>
    <style:style style:name="Listeàpuces5" style:display-name="Liste à puces 5" style:family="paragraph" style:parent-style-name="Normal" style:list-style-name="LFO12"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e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.16667in" svg:y="0.58333in" svg:width="7.94in" svg:height="10.97558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4:00Z</meta:creation-date>
    <dc:date>2026-05-21T21:25:00Z</dc:date>
    <meta:print-date>2026-05-21T21:16:00Z</meta:print-date>
    <meta:template xlink:href="%7b32BEE219-405B-4C88-888B-08640B17950B%7dtf00546271_win32.dotx" xlink:type="simple"/>
    <meta:editing-cycles>15</meta:editing-cycles>
    <meta:editing-duration>PT93240S</meta:editing-duration>
    <meta:document-statistic meta:page-count="1" meta:paragraph-count="4" meta:word-count="343" meta:character-count="2230" meta:row-count="15" meta:non-whitespace-character-count="1891"/>
  </office:meta>
</office:document-meta>
</file>